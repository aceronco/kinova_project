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b8f" officeooo:paragraph-rsid="00176b8f"/>
    </style:style>
    <style:style style:name="P2" style:family="paragraph" style:parent-style-name="Standard">
      <style:text-properties style:text-underline-style="none" officeooo:rsid="00176b8f" officeooo:paragraph-rsid="00176b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s para simular con copelia</text:p>
      <text:p text:style-name="P1"/>
      <text:p text:style-name="P1"/>
      <text:p text:style-name="Text_20_body">Instalar copelia: decargar archivo comprimido, descomprimirlo,</text:p>
      <text:p text:style-name="Text_20_body">/home/alexander/CoppeliaSim_Pro_V4_9_0_rev6_Ubuntu24_04</text:p>
      <text:p text:style-name="Text_20_body"/>
      <text:p text:style-name="P1"/>
      <text:p text:style-name="P1">ejecutar </text:p>
      <text:p text:style-name="P1">coppeliaSim</text:p>
      <text:p text:style-name="P1"/>
      <text:p text:style-name="P1"/>
      <text:p text:style-name="P1">abrir archivo kinova.ttt</text:p>
      <text:p text:style-name="P1"/>
      <text:p text:style-name="P1">darle play</text:p>
      <text:p text:style-name="P1"/>
      <text:p text:style-name="P1">ejecutar misim1.py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1T20:46:10.038918807</meta:creation-date>
    <dc:date>2026-07-01T21:22:47.551635933</dc:date>
    <meta:editing-duration>PT36M41S</meta:editing-duration>
    <meta:editing-cycles>1</meta:editing-cycles>
    <meta:document-statistic meta:table-count="0" meta:image-count="0" meta:object-count="0" meta:page-count="1" meta:paragraph-count="8" meta:word-count="21" meta:character-count="219" meta:non-whitespace-character-count="205"/>
    <meta:generator>LibreOffice/26.2.4.2$Linux_X86_64 LibreOffice_project/3346a99e6b841765b75a9b29714a5b95c6761ce3</meta:generator>
  </office:meta>
</office:document-meta>
</file>