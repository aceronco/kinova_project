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a16" officeooo:paragraph-rsid="00151a16"/>
    </style:style>
    <style:style style:name="P2" style:family="paragraph" style:parent-style-name="Standard">
      <style:text-properties officeooo:rsid="00042b4a" officeooo:paragraph-rsid="00042b4a"/>
    </style:style>
    <style:style style:name="P3" style:family="paragraph" style:parent-style-name="Standard">
      <style:text-properties officeooo:rsid="0005eacf" officeooo:paragraph-rsid="0005eacf"/>
    </style:style>
    <style:style style:name="P4" style:family="paragraph" style:parent-style-name="Standard">
      <style:text-properties officeooo:rsid="0008a72a" officeooo:paragraph-rsid="00042b4a"/>
    </style:style>
    <style:style style:name="P5" style:family="paragraph" style:parent-style-name="Standard">
      <style:text-properties officeooo:rsid="0008a72a" officeooo:paragraph-rsid="0008a72a"/>
    </style:style>
    <style:style style:name="P6" style:family="paragraph" style:parent-style-name="Standard">
      <style:text-properties officeooo:rsid="000a234a" officeooo:paragraph-rsid="000a234a"/>
    </style:style>
    <style:style style:name="P7" style:family="paragraph" style:parent-style-name="Standard">
      <style:text-properties officeooo:rsid="0008a72a" officeooo:paragraph-rsid="000a234a"/>
    </style:style>
    <style:style style:name="P8" style:family="paragraph" style:parent-style-name="Heading_20_3">
      <style:text-properties officeooo:rsid="0008a72a" officeooo:paragraph-rsid="000a234a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  <style:text-properties officeooo:paragraph-rsid="001758a0"/>
    </style:style>
    <style:style style:name="P11" style:family="paragraph" style:parent-style-name="Preformatted_20_Text">
      <style:paragraph-properties style:writing-mode="lr-tb"/>
    </style:style>
    <style:style style:name="T1" style:family="text">
      <style:text-properties officeooo:rsid="0005eacf"/>
    </style:style>
    <style:style style:name="T2" style:family="text">
      <style:text-properties officeooo:rsid="0008a72a"/>
    </style:style>
    <style:style style:name="T3" style:family="text">
      <style:text-properties officeooo:rsid="00175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robot</text:p>
      <text:p text:style-name="Standard"/>
      <text:p text:style-name="Standard"><text:a xlink:type="simple" xlink:href="https://www.kinovarobotics.com/product/gen3-lite-robots" text:style-name="Internet_20_link" text:visited-style-name="Visited_20_Internet_20_Link">https://www.kinovarobotics.com/product/gen3-lite-robots</text:a></text:p>
      <text:p text:style-name="Standard"/>
      <text:p text:style-name="P1">Informacion general</text:p>
      <text:p text:style-name="Standard"><text:a xlink:type="simple" xlink:href="https://schulich.libguides.com/c.php?g=722170&amp;p=5166359" text:style-name="Internet_20_link" text:visited-style-name="Visited_20_Internet_20_Link"/></text:p>
      <text:p text:style-name="Standard"><text:a xlink:type="simple" xlink:href="https://schulich.libguides.com/c.php?g=722170&amp;p=5166359" text:style-name="Internet_20_link" text:visited-style-name="Visited_20_Internet_20_Link">https://schulich.libguides.com/c.php?g=722170&amp;p=5166359</text:a></text:p>
      <text:p text:style-name="Standard"/>
      <text:p text:style-name="Standard"/>
      <text:p text:style-name="P2">Ver prerrequisitos</text:p>
      <text:p text:style-name="Standard"><text:a xlink:type="simple" xlink:href="https://schulich.libguides.com/c.php?g=722170&amp;p=5166357" text:style-name="Internet_20_link" text:visited-style-name="Visited_20_Internet_20_Link">https://schulich.libguides.com/c.php?g=722170&amp;p=5166357</text:a></text:p>
      <text:p text:style-name="Standard"/>
      <text:p text:style-name="Standard"/>
      <text:p text:style-name="P2">Mirar en addons <text:span text:style-name="T1">que este todo o reinstalar</text:span></text:p>
      <text:p text:style-name="P2"/>
      <text:p text:style-name="P2"/>
      <text:p text:style-name="P2"><text:a xlink:type="simple" xlink:href="https://schulich.libguides.com/c.php?g=722170&amp;p=5166358" text:style-name="Internet_20_link" text:visited-style-name="Visited_20_Internet_20_Link">https://schulich.libguides.com/c.php?g=722170&amp;p=5166358</text:a></text:p>
      <text:p text:style-name="P2"/>
      <text:p text:style-name="P2"/>
      <text:p text:style-name="P3">artifactory link</text:p>
      <text:p text:style-name="P2"><text:a xlink:type="simple" xlink:href="https://artifactory.kinovaapps.com/ui/repos/tree/General/generic-public%2Fkortex%2Fmatlab%2Fsimplified_API%2F2.2.1%2Fmatlab_simplified_api_2.2.1.zip" text:style-name="Internet_20_link" text:visited-style-name="Visited_20_Internet_20_Link">https://artifactory.kinovaapps.com/ui/repos/tree/General/generic-public%2Fkortex%2Fmatlab%2Fsimplified_API%2F2.2.1%2Fmatlab_simplified_api_2.2.1.zip</text:a></text:p>
      <text:p text:style-name="P4"/>
      <text:p text:style-name="P5"/>
      <text:p text:style-name="P6">arreglar el path</text:p>
      <text:p text:style-name="P6"/>
      <text:p text:style-name="P6">export LD_LIBRARY_PATH=&lt;CoppeliaSim installation folder&gt;/programming/remoteApiBindings/lib/lib/Ubuntu:$LD_LIBRARY_PATH</text:p>
      <text:p text:style-name="P5"/>
      <text:p text:style-name="P5">~/Documentos/CoppeliaSim_Edu_V4_7_0_rev4_Ubuntu22_04/programming/legacyRemoteApi/remoteApiBindings/lib/lib/Ubuntu20_04</text:p>
      <text:p text:style-name="P5"/>
      <text:p text:style-name="P5"/>
      <text:p text:style-name="P6">export LD_LIBRARY_PATH=<text:span text:style-name="T2">~/Documentos/CoppeliaSim_Edu_V4_7_0_rev4_Ubuntu22_04/programming/legacyRemoteApi/remoteApiBindings/lib/lib/Ubuntu20_04</text:span>:$LD_LIBRARY_PATH</text:p>
      <text:p text:style-name="P6"/>
      <text:p text:style-name="P7">Ejecutar en consola:</text:p>
      <text:p text:style-name="P7">appdesigner </text:p>
      <text:p text:style-name="P7">para abrir o crear interfaces</text:p>
      <text:p text:style-name="P7"/>
      <text:p text:style-name="P7"><text:a xlink:type="simple" xlink:href="https://la.mathworks.com/help/robotics/robotmanipulator/ug/connect-kinova-manipulate-arm.html" text:style-name="Internet_20_link" text:visited-style-name="Visited_20_Internet_20_Link"/></text:p>
      <text:p text:style-name="P7"><text:a xlink:type="simple" xlink:href="https://la.mathworks.com/help/robotics/robotmanipulator/ug/connect-kinova-manipulate-arm.html" text:style-name="Internet_20_link" text:visited-style-name="Visited_20_Internet_20_Link"/></text:p>
      <text:p text:style-name="P7"><text:a xlink:type="simple" xlink:href="https://la.mathworks.com/help/robotics/robotmanipulator/ug/connect-kinova-manipulate-arm.html" text:style-name="Internet_20_link" text:visited-style-name="Visited_20_Internet_20_Link">https://la.mathworks.com/help/robotics/robotmanipulator/ug/connect-kinova-manipulate-arm.html</text:a></text:p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github.com/Kinovarobotics/Kinova-kortex2_Gen3_G3L" text:style-name="Internet_20_link" text:visited-style-name="Visited_20_Internet_20_Link"><text:soft-page-break/>https://github.com/Kinovarobotics/Kinova-kortex2_Gen3_G3L</text:a></text:p>
      <text:p text:style-name="P7"/>
      <text:p text:style-name="P7"/>
      <text:p text:style-name="P7"/>
      <text:p text:style-name="P7"/>
      <text:h text:style-name="P8" text:outline-level="3">1. <text:span text:style-name="Strong_20_Emphasis">Crear el Entorno Virtual con el Nombre </text:span><text:span text:style-name="Strong_20_Emphasis"><text:span text:style-name="Source_20_Text">vkinova</text:span></text:span></text:h>
      <text:p text:style-name="Text_20_body">En lugar de usar <text:span text:style-name="Source_20_Text">venv</text:span>, usa el nombre <text:span text:style-name="Source_20_Text">vkinova</text:span>:</text:p>
      <text:p text:style-name="Preformatted_20_Text">bash</text:p>
      <text:p text:style-name="Preformatted_20_Text">Copy code</text:p>
      <text:p text:style-name="P9"><text:span text:style-name="Source_20_Text">python3 -m venv vkinova</text:span></text:p>
      <text:p text:style-name="Text_20_body">Esto creará un entorno virtual llamado <text:span text:style-name="Source_20_Text">vkinova</text:span> en el directorio donde ejecutes el comando.</text:p>
      <text:p text:style-name="Horizontal_20_Line"/>
      <text:h text:style-name="Heading_20_3" text:outline-level="3">2. <text:span text:style-name="Strong_20_Emphasis">Activar el Entorno Virtual </text:span><text:span text:style-name="Strong_20_Emphasis"><text:span text:style-name="Source_20_Text">vkinova</text:span></text:span></text:h>
      <text:p text:style-name="Text_20_body">Para activar el entorno con el nuevo nombre, usa:</text:p>
      <text:p text:style-name="P9"><text:span text:style-name="Source_20_Text">source vkinova/bin/activate</text:span></text:p>
      <text:p text:style-name="P10"><text:span text:style-name="Source_20_Text"><text:span text:style-name="T3">o si se llama vkinova39 verificar</text:span></text:span></text:p>
      <text:p text:style-name="Text_20_body">El prompt de tu terminal ahora debería mostrar <text:span text:style-name="Source_20_Text">(vkinova)</text:span> al principio, indicando que el entorno virtual está activo.</text:p>
      <text:p text:style-name="Horizontal_20_Line"/>
      <text:h text:style-name="Heading_20_3" text:outline-level="3">3. <text:span text:style-name="Strong_20_Emphasis">Instalar Dependencias en el Entorno </text:span><text:span text:style-name="Strong_20_Emphasis"><text:span text:style-name="Source_20_Text">vkinova</text:span></text:span></text:h>
      <text:p text:style-name="Text_20_body">Con el entorno activado, instala las dependencias necesarias:</text:p>
      <text:p text:style-name="Preformatted_20_Text">bash</text:p>
      <text:p text:style-name="Preformatted_20_Text">Copy code</text:p>
      <text:p text:style-name="P11"><text:span text:style-name="Source_20_Text">pip install --upgrade pip</text:span></text:p>
      <text:p text:style-name="P9"><text:span text:style-name="Source_20_Text">pip install kortex protobuf</text:span></text:p>
      <text:p text:style-name="Text_20_body">Si tienes un archivo <text:span text:style-name="Source_20_Text">requirements.txt</text:span>, también puedes usar:</text:p>
      <text:p text:style-name="Preformatted_20_Text">bash</text:p>
      <text:p text:style-name="Preformatted_20_Text">Copy code</text:p>
      <text:p text:style-name="P9"><text:span text:style-name="Source_20_Text">pip install -r requirements.txt</text:span></text:p>
      <text:p text:style-name="Horizontal_20_Line"/>
      <text:h text:style-name="Heading_20_3" text:outline-level="3">4. <text:span text:style-name="Strong_20_Emphasis">Desactivar el Entorno Virtual </text:span><text:span text:style-name="Strong_20_Emphasis"><text:span text:style-name="Source_20_Text">vkinova</text:span></text:span></text:h>
      <text:p text:style-name="Text_20_body">Cuando termines de trabajar, desactiva el entorno con:</text:p>
      <text:p text:style-name="Preformatted_20_Text">bash</text:p>
      <text:p text:style-name="Preformatted_20_Text">Copy code</text:p>
      <text:p text:style-name="P9"><text:span text:style-name="Source_20_Text">deactivate</text:span></text:p>
      <text:p text:style-name="Horizontal_20_Line"><text:soft-page-break/></text:p>
      <text:h text:style-name="Heading_20_3" text:outline-level="3">5. <text:span text:style-name="Strong_20_Emphasis">Alias para Activar el Entorno </text:span><text:span text:style-name="Strong_20_Emphasis"><text:span text:style-name="Source_20_Text">vkinova</text:span></text:span></text:h>
      <text:p text:style-name="Text_20_body">Si quieres crear un alias para activar fácilmente el entorno virtual con el nombre <text:span text:style-name="Source_20_Text">vkinova</text:span>, agrega lo siguiente a tu archivo <text:span text:style-name="Source_20_Text">~/.bashrc</text:span>:</text:p>
      <text:p text:style-name="Preformatted_20_Text">bash</text:p>
      <text:p text:style-name="Preformatted_20_Text">Copy code</text:p>
      <text:p text:style-name="P11"><text:span text:style-name="Source_20_Text">echo "alias activate_kinova='source ~/kinova_project/vkinova/bin/activate'" &gt;&gt; ~/.bashrc</text:span></text:p>
      <text:p text:style-name="P9"><text:span text:style-name="Source_20_Text">source ~/.bashrc</text:span></text:p>
      <text:p text:style-name="Text_20_body">Con esto, podrás activar el entorno rápidamente escribiendo:</text:p>
      <text:p text:style-name="Preformatted_20_Text">bash</text:p>
      <text:p text:style-name="Preformatted_20_Text">Copy code</text:p>
      <text:p text:style-name="P9"><text:span text:style-name="Source_20_Text">activate_kinova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2:26:10.651269941</meta:creation-date>
    <dc:date>2026-07-01T10:51:27.573263229</dc:date>
    <meta:editing-duration>PT4H28M37S</meta:editing-duration>
    <meta:editing-cycles>9</meta:editing-cycles>
    <meta:generator>LibreOffice/26.2.3.2$Linux_X86_64 LibreOffice_project/d4d5ed47b6084125f28d269a5650105d54dde034</meta:generator>
    <meta:document-statistic meta:table-count="0" meta:image-count="0" meta:object-count="0" meta:page-count="3" meta:paragraph-count="55" meta:word-count="234" meta:character-count="2351" meta:non-whitespace-character-count="2172"/>
  </office:meta>
</office:document-meta>
</file>