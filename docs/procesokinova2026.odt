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300000087901DF559.png" manifest:media-type="image/png"/>
  <manifest:file-entry manifest:full-path="Pictures/100000010000029B000000C7EB7B1B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77c" officeooo:paragraph-rsid="001c577c"/>
    </style:style>
    <style:style style:name="P2" style:family="paragraph" style:parent-style-name="Standard">
      <style:text-properties officeooo:rsid="00232ded" officeooo:paragraph-rsid="00232ded"/>
    </style:style>
    <style:style style:name="P3" style:family="paragraph" style:parent-style-name="Heading_20_2">
      <style:text-properties officeooo:rsid="00232ded" officeooo:paragraph-rsid="00232ded"/>
    </style:style>
    <style:style style:name="P4" style:family="paragraph" style:parent-style-name="Text_20_body">
      <style:text-properties officeooo:rsid="00232ded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rsid="00232ded"/>
    </style:style>
    <style:style style:name="P6" style:family="paragraph" style:parent-style-name="Preformatted_20_Text">
      <style:text-properties officeooo:rsid="00232ded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232ded"/>
    </style:style>
    <style:style style:name="P8" style:family="paragraph" style:parent-style-name="Standard">
      <style:text-properties officeooo:rsid="00200472" officeooo:paragraph-rsid="00200472"/>
    </style:style>
    <style:style style:name="P9" style:family="paragraph" style:parent-style-name="Heading_20_3">
      <style:text-properties officeooo:rsid="0008a72a" officeooo:paragraph-rsid="0015aebc"/>
    </style:style>
    <style:style style:name="P10" style:family="paragraph" style:parent-style-name="Text_20_body">
      <style:text-properties style:text-underline-style="solid" style:text-underline-width="auto" style:text-underline-color="font-color" officeooo:rsid="00266645" officeooo:paragraph-rsid="00266645"/>
    </style:style>
    <style:style style:name="P11" style:family="paragraph" style:parent-style-name="Preformatted_20_Text">
      <style:text-properties officeooo:paragraph-rsid="0015aebc"/>
    </style:style>
    <style:style style:name="P12" style:family="paragraph" style:parent-style-name="Preformatted_20_Text">
      <style:text-properties officeooo:rsid="0019cb8b" officeooo:paragraph-rsid="0019cb8b"/>
    </style:style>
    <style:style style:name="P13" style:family="paragraph" style:parent-style-name="Preformatted_20_Text">
      <style:paragraph-properties fo:margin-top="0cm" fo:margin-bottom="0.499cm" style:contextual-spacing="false" style:writing-mode="lr-tb"/>
      <style:text-properties officeooo:paragraph-rsid="0015aebc"/>
    </style:style>
    <style:style style:name="P14" style:family="paragraph" style:parent-style-name="Text_20_body">
      <style:text-properties officeooo:paragraph-rsid="0015aebc"/>
    </style:style>
    <style:style style:name="P15" style:family="paragraph" style:parent-style-name="Horizontal_20_Line">
      <style:text-properties officeooo:paragraph-rsid="0015aebc"/>
    </style:style>
    <style:style style:name="P16" style:family="paragraph" style:parent-style-name="Heading_20_3">
      <style:text-properties officeooo:paragraph-rsid="0015aebc"/>
    </style:style>
    <style:style style:name="P17" style:family="paragraph" style:parent-style-name="Preformatted_20_Text">
      <style:paragraph-properties style:writing-mode="lr-tb"/>
      <style:text-properties officeooo:paragraph-rsid="0015aebc"/>
    </style:style>
    <style:style style:name="P18" style:family="paragraph" style:parent-style-name="Preformatted_20_Text">
      <style:text-properties officeooo:rsid="0015aebc" officeooo:paragraph-rsid="0015aebc"/>
    </style:style>
    <style:style style:name="P19" style:family="paragraph" style:parent-style-name="Preformatted_20_Text">
      <style:text-properties officeooo:rsid="0015aebc" officeooo:paragraph-rsid="00175370"/>
    </style:style>
    <style:style style:name="P20" style:family="paragraph" style:parent-style-name="Text_20_body">
      <style:text-properties officeooo:paragraph-rsid="001ada05"/>
    </style:style>
    <style:style style:name="P21" style:family="paragraph" style:parent-style-name="Text_20_body">
      <style:text-properties officeooo:rsid="001ada05" officeooo:paragraph-rsid="001ada05"/>
    </style:style>
    <style:style style:name="P22" style:family="paragraph" style:parent-style-name="Standard">
      <style:text-properties officeooo:rsid="0008a72a" officeooo:paragraph-rsid="0015aebc"/>
    </style:style>
    <style:style style:name="P23" style:family="paragraph" style:parent-style-name="Text_20_body">
      <style:text-properties officeooo:rsid="00278a2f" officeooo:paragraph-rsid="00278a2f"/>
    </style:style>
    <style:style style:name="P24" style:family="paragraph" style:parent-style-name="Text_20_body">
      <style:text-properties officeooo:rsid="002774e5" officeooo:paragraph-rsid="002774e5"/>
    </style:style>
    <style:style style:name="P25" style:family="paragraph" style:parent-style-name="Heading_20_2">
      <style:text-properties officeooo:rsid="002774e5" officeooo:paragraph-rsid="002774e5"/>
    </style:style>
    <style:style style:name="P26" style:family="paragraph" style:parent-style-name="Text_20_body">
      <style:text-properties officeooo:rsid="002774e5"/>
    </style:style>
    <style:style style:name="P2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774e5"/>
    </style:style>
    <style:style style:name="T1" style:family="text">
      <style:text-properties officeooo:rsid="00266645"/>
    </style:style>
    <style:style style:name="T2" style:family="text">
      <style:text-properties officeooo:rsid="00262837"/>
    </style:style>
    <style:style style:name="T3" style:family="text">
      <style:text-properties officeooo:rsid="00175370"/>
    </style:style>
    <style:style style:name="T4" style:family="text">
      <style:text-properties officeooo:rsid="001ada05"/>
    </style:style>
    <style:style style:name="T5" style:family="text">
      <style:text-properties officeooo:rsid="00267c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sudo apt update</text:p>
      <text:p text:style-name="Standard">sudo apt upgrade -y</text:p>
      <text:p text:style-name="Standard"/>
      <text:p text:style-name="Standard"/>
      <text:p text:style-name="Standard"/>
      <text:p text:style-name="Standard">sudo apt install -y \</text:p>
      <text:p text:style-name="Standard">git \</text:p>
      <text:p text:style-name="Standard">curl \</text:p>
      <text:p text:style-name="Standard">wget \</text:p>
      <text:p text:style-name="Standard">build-essential \</text:p>
      <text:p text:style-name="Standard">cmake \</text:p>
      <text:p text:style-name="Standard">pkg-config \</text:p>
      <text:p text:style-name="Standard">python3 \</text:p>
      <text:p text:style-name="Standard">python3-pip \</text:p>
      <text:p text:style-name="Standard">python3-venv</text:p>
      <text:p text:style-name="Standard"/>
      <text:p text:style-name="Standard"/>
      <text:p text:style-name="P1">toca instalar un environment para python 3.9 en ubuntu 24.04</text:p>
      <text:p text:style-name="Standard"/>
      <text:p text:style-name="Standard">1. Instalar dependencias</text:p>
      <text:p text:style-name="Standard">sudo apt update</text:p>
      <text:p text:style-name="Standard"/>
      <text:p text:style-name="Standard">sudo apt install -y \</text:p>
      <text:p text:style-name="Standard">build-essential \</text:p>
      <text:p text:style-name="Standard">curl \</text:p>
      <text:p text:style-name="Standard">git \</text:p>
      <text:p text:style-name="Standard">libssl-dev \</text:p>
      <text:p text:style-name="Standard">zlib1g-dev \</text:p>
      <text:p text:style-name="Standard">libbz2-dev \</text:p>
      <text:p text:style-name="Standard">libreadline-dev \</text:p>
      <text:p text:style-name="Standard">libsqlite3-dev \</text:p>
      <text:p text:style-name="Standard">libffi-dev \</text:p>
      <text:p text:style-name="Standard">libncursesw5-dev \</text:p>
      <text:p text:style-name="Standard">xz-utils \</text:p>
      <text:p text:style-name="Standard">tk-dev \</text:p>
      <text:p text:style-name="Standard">libxml2-dev \</text:p>
      <text:p text:style-name="Standard">libxmlsec1-dev \</text:p>
      <text:p text:style-name="Standard">liblzma-dev</text:p>
      <text:p text:style-name="Standard"/>
      <text:p text:style-name="Standard">2. Instalar pyenv</text:p>
      <text:p text:style-name="Standard">curl https://pyenv.run | bash</text:p>
      <text:p text:style-name="Standard"/>
      <text:p text:style-name="Standard">3. Agregar pyenv al shell</text:p>
      <text:p text:style-name="Standard"/>
      <text:p text:style-name="Standard">echo 'export PYENV_ROOT="$HOME/.pyenv"' &gt;&gt; ~/.bashrc</text:p>
      <text:p text:style-name="Standard">echo 'export PATH="$PYENV_ROOT/bin:$PATH"' &gt;&gt; ~/.bashrc</text:p>
      <text:p text:style-name="Standard">echo 'eval "$(pyenv init - bash)"' &gt;&gt; ~/.bashrc</text:p>
      <text:p text:style-name="Standard"/>
      <text:p text:style-name="Standard"/>
      <text:p text:style-name="Standard"/>
      <text:p text:style-name="Standard"><text:soft-page-break/>source ~/.bashrc</text:p>
      <text:p text:style-name="Standard"/>
      <text:p text:style-name="Standard">4. Instalar Python 3.9.25</text:p>
      <text:p text:style-name="Standard"/>
      <text:p text:style-name="Standard">pyenv install 3.9.25</text:p>
      <text:p text:style-name="Standard"/>
      <text:p text:style-name="Standard"/>
      <text:p text:style-name="Standard">Verifica:</text:p>
      <text:p text:style-name="Standard"/>
      <text:p text:style-name="Standard">pyenv versions</text:p>
      <text:p text:style-name="Standard"/>
      <text:p text:style-name="Standard">5. Crear el entorno virtual</text:p>
      <text:p text:style-name="Standard"/>
      <text:p text:style-name="Standard">cd ~/kinova_project</text:p>
      <text:p text:style-name="Standard"/>
      <text:p text:style-name="Standard">pyenv shell 3.9.25</text:p>
      <text:p text:style-name="Standard"/>
      <text:p text:style-name="Standard">python -m venv vkinova39</text:p>
      <text:p text:style-name="Standard"/>
      <text:p text:style-name="P2">activarlo</text:p>
      <text:p text:style-name="P2"/>
      <text:p text:style-name="P2">source vkinova39/bin/activate</text:p>
      <text:p text:style-name="P2"/>
      <text:p text:style-name="P2">python –version</text:p>
      <text:p text:style-name="P2"/>
      <text:p text:style-name="P2">python prueba0.py</text:p>
      <text:p text:style-name="P2"/>
      <text:h text:style-name="P3" text:outline-level="2">Después</text:h>
      <text:p text:style-name="P4">Instalarías únicamente las librerías necesarias:</text:p>
      <text:section text:style-name="Sect1" text:name="code-block-viewer">
        <text:p text:style-name="P5"><text:span text:style-name="Source_20_Text">pip install --upgrade pip</text:span></text:p>
        <text:p text:style-name="P6"><text:span text:style-name="Source_20_Text">pip install kortex-api</text:span></text:p>
        <text:p text:style-name="P6"><text:span text:style-name="Source_20_Text">pip install ultralytics</text:span></text:p>
        <text:p text:style-name="P7"><text:span text:style-name="Source_20_Text">pip install opencv-python</text:span></text:p>
      </text:section>
      <text:p text:style-name="P2"/>
      <text:p text:style-name="Standard"/>
      <text:p text:style-name="Standard"/>
      <text:p text:style-name="Standard"/>
      <text:p text:style-name="P8"/>
      <text:p text:style-name="Standard"/>
      <text:h text:style-name="P9" text:outline-level="3">1. <text:span text:style-name="Strong_20_Emphasis">Crear el Entorno Virtual con el Nombre </text:span><text:span text:style-name="Source_20_Text">vkinova</text:span></text:h>
      <text:p text:style-name="P10">Esto ya se hizo atras</text:p>
      <text:p text:style-name="P11">bash</text:p>
      <text:p text:style-name="P12">en raiz hacer la carpeta de trabajo y entrar</text:p>
      <text:p text:style-name="P11">alexander@alexander-K501UX:~$ cd kinova_project</text:p>
      <text:p text:style-name="P11"/>
      <text:p text:style-name="P13"><text:span text:style-name="Source_20_Text">python3 -m venv vkinova</text:span><text:span text:style-name="Source_20_Text"><text:span text:style-name="T1">39</text:span></text:span></text:p>
      <text:p text:style-name="P14">Esto creará un entorno virtual llamado <text:span text:style-name="Source_20_Text">vkinova</text:span> en el directorio donde ejecutes el comando.</text:p>
      <text:p text:style-name="P15"><text:soft-page-break/></text:p>
      <text:h text:style-name="P16" text:outline-level="3">2. <text:span text:style-name="Strong_20_Emphasis">Activar el Entorno Virtual </text:span><text:span text:style-name="Source_20_Text">vkinova</text:span></text:h>
      <text:p text:style-name="P14">Para activar el entorno con el nuevo nombre, usa:</text:p>
      <text:p text:style-name="P13"><text:span text:style-name="Source_20_Text">source vkinova</text:span><text:span text:style-name="Source_20_Text"><text:span text:style-name="T2">39</text:span></text:span><text:span text:style-name="Source_20_Text">/bin/activate</text:span></text:p>
      <text:p text:style-name="P14">El prompt de tu terminal ahora debería mostrar <text:span text:style-name="Source_20_Text">(vkinova</text:span><text:span text:style-name="Source_20_Text"><text:span text:style-name="T1">39</text:span></text:span><text:span text:style-name="Source_20_Text">)</text:span> al principio, indicando que el entorno virtual está activo.</text:p>
      <text:p text:style-name="P15"/>
      <text:h text:style-name="P16" text:outline-level="3">3. <text:span text:style-name="Strong_20_Emphasis">Instalar Dependencias en el Entorno </text:span><text:span text:style-name="Source_20_Text">vkinova</text:span></text:h>
      <text:p text:style-name="P14">Con el entorno activado, instala las dependencias necesarias:</text:p>
      <text:p text:style-name="P11"/>
      <text:p text:style-name="P17"><text:span text:style-name="Source_20_Text">pip install --upgrade pip</text:span></text:p>
      <text:p text:style-name="P13"><text:span text:style-name="Source_20_Text">pip install kortex protobuf</text:span></text:p>
      <text:p text:style-name="P14">Si tienes un archivo <text:span text:style-name="Source_20_Text">requirements.txt</text:span>, también puedes usar:</text:p>
      <text:p text:style-name="P13"><text:span text:style-name="Source_20_Text">pip install -r requirements.txt</text:span></text:p>
      <text:p text:style-name="P15"/>
      <text:h text:style-name="P16" text:outline-level="3">4. <text:span text:style-name="Strong_20_Emphasis">Desactivar el Entorno Virtual </text:span><text:span text:style-name="Source_20_Text">vkinova</text:span></text:h>
      <text:p text:style-name="P14">Cuando termines de trabajar, desactiva el entorno con:</text:p>
      <text:p text:style-name="P18">en consola</text:p>
      <text:p text:style-name="P11"/>
      <text:p text:style-name="P13"><text:span text:style-name="Source_20_Text">deactivate</text:span></text:p>
      <text:p text:style-name="P15"/>
      <text:h text:style-name="P16" text:outline-level="3">5. <text:span text:style-name="Strong_20_Emphasis">Alias para Activar el Entorno </text:span><text:span text:style-name="Source_20_Text">vkinova</text:span></text:h>
      <text:p text:style-name="P14">Si quieres crear un alias para activar fácilmente el entorno virtual con el nombre <text:span text:style-name="Source_20_Text">vkinova</text:span>, agrega lo siguiente a tu archivo <text:span text:style-name="Source_20_Text">~/.bashrc</text:span>:</text:p>
      <text:p text:style-name="P19">en consola <text:span text:style-name="T3">revisar ruta</text:span></text:p>
      <text:p text:style-name="P19"/>
      <text:p text:style-name="P17"><text:span text:style-name="Source_20_Text">echo "alias activate_kinova='source ~/kinova_project/vkinova/bin/activate'" &gt;&gt; ~/.bashrc</text:span></text:p>
      <text:p text:style-name="P17"><text:span text:style-name="Source_20_Text"/></text:p>
      <text:p text:style-name="P13"><text:span text:style-name="Source_20_Text">source ~/.bashrc</text:span></text:p>
      <text:p text:style-name="P13"><text:span text:style-name="Source_20_Text"/></text:p>
      <text:p text:style-name="P20"><text:span text:style-name="Source_20_Text"><text:span text:style-name="T4">Lo anterior agregara <text:s/>al .bashrc</text:span></text:span></text:p>
      <text:p text:style-name="Text_20_body">alias activate_kinova='source ~/kinova_project/vkinova<text:span text:style-name="T5">39</text:span>/bin/activate'</text:p>
      <text:p text:style-name="P21"/>
      <text:p text:style-name="P14">Con esto, podrás activar el entorno rápidamente escribiendo:</text:p>
      <text:p text:style-name="P19"><text:soft-page-break/>en consola</text:p>
      <text:p text:style-name="P13"><text:span text:style-name="Source_20_Text">activate_kinova</text:span></text:p>
      <text:p text:style-name="P22"/>
      <text:p text:style-name="P22"/>
      <text:p text:style-name="P14"/>
      <text:p text:style-name="P23">UTILIZAR EL PROCESO EN VISUAL STUDIO</text:p>
      <text:p text:style-name="P23">Instalar extension de python</text:p>
      <text:p text:style-name="P24"/>
      <text:p text:style-name="P24"/>
      <text:p text:style-name="P24"/>
      <text:p text:style-name="P24"/>
      <text:h text:style-name="P25" text:outline-level="2">1. Activa el entorno desde la terminal (para comprobar que funciona)</text:h>
      <text:p text:style-name="P26">Supongamos que tu entorno se llama <text:span text:style-name="Source_20_Text">vkinova</text:span>.</text:p>
      <text:p text:style-name="P26">En Ubuntu:</text:p>
      <text:p text:style-name="P24">source ~/kinova_project/vkinova39/bin/activate</text:p>
      <text:p text:style-name="P24">Comprueba que todo está bien:</text:p>
      <text:section text:style-name="Sect1" text:name="Sección1">
        <text:p text:style-name="P27"><text:bookmark text:name="code-block-viewer"/><text:span text:style-name="Source_20_Text">python --version</text:span></text:p>
      </text:section>
      <text:p text:style-name="P26">y</text:p>
      <text:section text:style-name="Sect1" text:name="Sección2">
        <text:p text:style-name="P27"><text:bookmark text:name="code-block-viewer Copia 1"/><text:span text:style-name="Source_20_Text">python -c "import kortex_api; print('OK')"</text:span></text:p>
      </text:section>
      <text:p text:style-name="P26">Si aparece:</text:p>
      <text:section text:style-name="Sect1" text:name="Sección3">
        <text:p text:style-name="P27"><text:bookmark text:name="code-block-viewer Copia 2"/><text:span text:style-name="Source_20_Text">OK</text:span></text:p>
      </text:section>
      <text:p text:style-name="P26">el entorno está correcto.</text:p>
      <text:p text:style-name="P24"/>
      <text:h text:style-name="P25" text:outline-level="2">2. Abre el proyecto en VS Code</text:h>
      <text:p text:style-name="P26">Abre la carpeta donde tienes tus programas:</text:p>
      <text:p text:style-name="P24">code ~/kinova_project</text:p>
      <text:p text:style-name="P24"/>
      <text:p text:style-name="P24"/>
      <text:p text:style-name="P24"/>
      <text:p text:style-name="P24"/>
      <text:p text:style-name="P24"/>
      <text:h text:style-name="P25" text:outline-level="2"><text:soft-page-break/>3. Selecciona el intérprete de Python</text:h>
      <text:p text:style-name="P26">En VS Code presiona:</text:p>
      <text:section text:style-name="Sect1" text:name="Sección4">
        <text:p text:style-name="P27"><text:bookmark text:name="code-block-viewer Copia 3"/><text:span text:style-name="Source_20_Text">Ctrl + Shift + P</text:span></text:p>
      </text:section>
      <text:p text:style-name="P26">Escribe:</text:p>
      <text:section text:style-name="Sect1" text:name="Sección5">
        <text:p text:style-name="P27"><text:bookmark text:name="code-block-viewer Copia 4"/><text:span text:style-name="Source_20_Text">Python: Select Interpreter</text:span></text:p>
      </text:section>
      <text:p text:style-name="P26">Selecciona el intérprete que corresponda a tu entorno, por ejemplo:</text:p>
      <text:section text:style-name="Sect1" text:name="Sección6">
        <text:p text:style-name="P27"><text:bookmark text:name="code-block-viewer Copia 5"/></text:p>
      </text:section>
      <text:p text:style-name="P24"><draw:frame draw:style-name="fr1" draw:name="Imagen1" text:anchor-type="char" svg:x="0cm" svg:y="-0.109cm" svg:width="17cm" svg:height="5.071cm" draw:z-index="0"><draw:image xlink:href="Pictures/100000010000029B000000C7EB7B1BA6.png" xlink:type="simple" xlink:show="embed" xlink:actuate="onLoad" draw:mime-type="image/png"/></draw:frame></text:p>
      <text:h text:style-name="P25" text:outline-level="2">4. Verifica que VS Code está usando ese entorno</text:h>
      <text:p text:style-name="P26">Abre una terminal integrada (<text:span text:style-name="Source_20_Text">Ctrl + ñ</text:span> o <text:span text:style-name="Strong_20_Emphasis">Terminal → New Terminal</text:span>) y ejecuta:</text:p>
      <text:section text:style-name="Sect1" text:name="Sección7">
        <text:p text:style-name="P27"><text:bookmark text:name="code-block-viewer Copia 6"/><text:span text:style-name="Source_20_Text">which python</text:span></text:p>
      </text:section>
      <text:p text:style-name="P26">Debería mostrar algo parecido a:</text:p>
      <text:section text:style-name="Sect1" text:name="Sección8">
        <text:p text:style-name="P27"><text:bookmark text:name="code-block-viewer Copia 7"/><text:span text:style-name="Source_20_Text">/home/alexander/vkinova/bin/python</text:span></text:p>
      </text:section>
      <text:p text:style-name="P26">No debería mostrar:</text:p>
      <text:section text:style-name="Sect1" text:name="Sección9">
        <text:p text:style-name="P27"><text:bookmark text:name="code-block-viewer Copia 8"/><text:span text:style-name="Source_20_Text">/usr/bin/python3</text:span></text:p>
      </text:section>
      <text:p text:style-name="P24"/>
      <text:p text:style-name="P24"><draw:frame draw:style-name="fr2" draw:name="Imagen2" text:anchor-type="char" svg:width="17cm" svg:height="2.976cm" draw:z-index="1"><draw:image xlink:href="Pictures/100000010000030300000087901DF55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15:50:21.056047230</meta:creation-date>
    <dc:date>2026-07-02T10:38:00.544553332</dc:date>
    <meta:editing-duration>PT1H27M24S</meta:editing-duration>
    <meta:editing-cycles>19</meta:editing-cycles>
    <meta:generator>LibreOffice/26.2.4.2$Linux_X86_64 LibreOffice_project/3346a99e6b841765b75a9b29714a5b95c6761ce3</meta:generator>
    <meta:document-statistic meta:table-count="0" meta:image-count="2" meta:object-count="0" meta:page-count="6" meta:paragraph-count="116" meta:word-count="488" meta:character-count="3289" meta:non-whitespace-character-count="2919"/>
  </office:meta>
</office:document-meta>
</file>